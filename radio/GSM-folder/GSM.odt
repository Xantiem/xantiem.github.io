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18CDA65F61.jpg" manifest:media-type="image/jpeg"/>
  <manifest:file-entry manifest:full-path="Pictures/1000000000000780000004185A8D4AFF.png" manifest:media-type="image/png"/>
  <manifest:file-entry manifest:full-path="Pictures/10000000000005B0000003338A4A18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style:vertical-align="" style:writing-mode="page"/>
    </style:style>
    <style:style style:name="Table4.A2" style:family="table-cell">
      <style:table-cell-properties style:vertical-align="" fo:padding="0in" fo:border="none" style:writing-mode="page"/>
    </style:style>
    <style:style style:name="Table4.A3" style:family="table-cell">
      <style:table-cell-properties style:writing-mode="page"/>
    </style:style>
    <style:style style:name="Table4.B3" style:family="table-cell">
      <style:table-cell-properties style:writing-mode="page"/>
    </style:style>
    <style:style style:name="Table4.C3" style:family="table-cell">
      <style:table-cell-properties style:writing-mode="page"/>
    </style:style>
    <style:style style:name="Table4.A4" style:family="table-cell">
      <style:table-cell-properties style:writing-mode="page"/>
    </style:style>
    <style:style style:name="Table4.B4" style:family="table-cell">
      <style:table-cell-properties style:writing-mode="page"/>
    </style:style>
    <style:style style:name="Table4.C4" style:family="table-cell">
      <style:table-cell-properties style:writing-mode="page"/>
    </style:style>
    <style:style style:name="Table4.A5" style:family="table-cell">
      <style:table-cell-properties style:writing-mode="page"/>
    </style:style>
    <style:style style:name="Table4.B5" style:family="table-cell">
      <style:table-cell-properties style:writing-mode="page"/>
    </style:style>
    <style:style style:name="Table4.C5" style:family="table-cell">
      <style:table-cell-properties style:writing-mode="page"/>
    </style:style>
    <style:style style:name="Table4.A6" style:family="table-cell">
      <style:table-cell-properties style:writing-mode="page"/>
    </style:style>
    <style:style style:name="Table4.B6" style:family="table-cell">
      <style:table-cell-properties style:writing-mode="page"/>
    </style:style>
    <style:style style:name="Table4.C6" style:family="table-cell">
      <style:table-cell-properties style:writing-mode="page"/>
    </style:style>
    <style:style style:name="Table4.A7" style:family="table-cell">
      <style:table-cell-properties style:writing-mode="page"/>
    </style:style>
    <style:style style:name="Table4.B7" style:family="table-cell">
      <style:table-cell-properties style:writing-mode="page"/>
    </style:style>
    <style:style style:name="Table4.C7" style:family="table-cell">
      <style:table-cell-properties style:writing-mode="page"/>
    </style:style>
    <style:style style:name="P1" style:family="paragraph" style:parent-style-name="Title">
      <style:text-properties style:font-name="Nimbus Roman"/>
    </style:style>
    <style:style style:name="P2" style:family="paragraph" style:parent-style-name="Text_20_body">
      <style:text-properties style:font-name="Nimbus Roman" fo:font-size="11pt" fo:font-weight="bold" officeooo:rsid="0015c3f4" officeooo:paragraph-rsid="0015c3f4" style:font-size-asian="11pt" style:font-weight-asian="bold" style:font-size-complex="11pt" style:font-weight-complex="bold"/>
    </style:style>
    <style:style style:name="P3" style:family="paragraph" style:parent-style-name="Text_20_body">
      <style:text-properties officeooo:paragraph-rsid="00156877"/>
    </style:style>
    <style:style style:name="P4" style:family="paragraph" style:parent-style-name="Text_20_body">
      <style:text-properties style:font-name="Nimbus Roman" fo:font-size="11pt" officeooo:rsid="0015c3f4" officeooo:paragraph-rsid="0015c3f4" style:font-size-asian="11pt" style:font-size-complex="11pt"/>
    </style:style>
    <style:style style:name="P5" style:family="paragraph" style:parent-style-name="Text_20_body">
      <style:text-properties style:font-name="Nimbus Roman" fo:font-size="11pt" officeooo:rsid="00173c06" officeooo:paragraph-rsid="00173c06" style:font-size-asian="11pt" style:font-size-complex="11pt"/>
    </style:style>
    <style:style style:name="P6" style:family="paragraph" style:parent-style-name="Text_20_body">
      <style:text-properties style:font-name="Nimbus Roman" fo:font-size="11pt" fo:font-weight="bold" officeooo:rsid="00173c06" officeooo:paragraph-rsid="00173c06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Nimbus Roman" fo:font-size="11pt" fo:font-weight="normal" officeooo:rsid="0017973a" officeooo:paragraph-rsid="0017973a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Nimbus Roman" fo:font-size="11pt" fo:font-weight="bold" officeooo:rsid="001a02bd" officeooo:paragraph-rsid="001a02bd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Nimbus Roman" fo:font-size="11pt" fo:font-weight="normal" officeooo:rsid="001a265b" officeooo:paragraph-rsid="001a265b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Nimbus Roman" fo:font-size="11pt" fo:font-weight="normal" officeooo:rsid="001ac5d5" officeooo:paragraph-rsid="001bfbb8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text-align="left" style:justify-single-word="false"/>
      <style:text-properties style:font-name="Nimbus Roman" fo:font-size="11pt" fo:font-weight="normal" officeooo:rsid="001bfbb8" officeooo:paragraph-rsid="001e9dbe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text-align="left" style:justify-single-word="false"/>
      <style:text-properties style:font-name="Nimbus Roman" fo:font-size="11pt" style:font-size-asian="11pt" style:font-size-complex="11pt"/>
    </style:style>
    <style:style style:name="P13" style:family="paragraph" style:parent-style-name="Text_20_body">
      <style:paragraph-properties fo:text-align="left" style:justify-single-word="false"/>
      <style:text-properties style:font-name="Nimbus Roman" fo:font-size="11pt" officeooo:paragraph-rsid="001e9dbe" style:font-size-asian="11pt" style:font-size-complex="11pt"/>
    </style:style>
    <style:style style:name="P14" style:family="paragraph" style:parent-style-name="Text_20_body">
      <style:text-properties style:font-name="Nimbus Roman" fo:font-size="11pt" fo:font-weight="normal" officeooo:rsid="001ac5d5" officeooo:paragraph-rsid="001ac5d5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Nimbus Roman" fo:font-size="11pt" fo:font-weight="normal" officeooo:rsid="001f54a3" officeooo:paragraph-rsid="001f54a3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Nimbus Roman" fo:font-size="11pt" fo:font-weight="normal" officeooo:rsid="001fe8e8" officeooo:paragraph-rsid="001fe8e8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Nimbus Roman" fo:font-size="11pt" fo:font-weight="normal" officeooo:rsid="001a265b" officeooo:paragraph-rsid="00203b44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font-name="Nimbus Roman" fo:font-size="11pt" officeooo:paragraph-rsid="00203b44" style:font-size-asian="11pt" style:font-size-complex="11pt"/>
    </style:style>
    <style:style style:name="P19" style:family="paragraph" style:parent-style-name="Table_20_Contents">
      <style:text-properties style:font-name="Nimbus Roman" fo:font-size="11pt" style:font-size-asian="11pt" style:font-size-complex="11pt"/>
    </style:style>
    <style:style style:name="P20" style:family="paragraph" style:parent-style-name="Text_20_body">
      <style:text-properties style:font-name="Nimbus Roman" fo:font-size="11pt" fo:font-weight="normal" officeooo:rsid="00203b44" officeooo:paragraph-rsid="00203b44" style:font-size-asian="11pt" style:font-weight-asian="normal" style:font-size-complex="11pt" style:font-weight-complex="normal"/>
    </style:style>
    <style:style style:name="P21" style:family="paragraph" style:parent-style-name="Text_20_body">
      <style:text-properties style:font-name="Nimbus Roman" fo:font-size="11pt" fo:font-weight="normal" officeooo:rsid="0021df38" officeooo:paragraph-rsid="0021df38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font-name="Nimbus Roman" fo:font-size="11pt" officeooo:rsid="00220821" officeooo:paragraph-rsid="00220821" style:font-size-asian="11pt" style:font-size-complex="11pt"/>
    </style:style>
    <style:style style:name="P23" style:family="paragraph" style:parent-style-name="Text_20_body">
      <style:text-properties style:font-name="Nimbus Roman" fo:font-size="11pt" fo:font-weight="normal" officeooo:rsid="0021df38" officeooo:paragraph-rsid="00220821" style:font-size-asian="11pt" style:font-weight-asian="normal" style:font-size-complex="11pt" style:font-weight-complex="normal"/>
    </style:style>
    <style:style style:name="P24" style:family="paragraph" style:parent-style-name="Text_20_body">
      <style:text-properties style:font-name="Nimbus Roman" fo:font-size="11pt" fo:font-weight="bold" officeooo:rsid="0017973a" officeooo:paragraph-rsid="0017973a" style:font-size-asian="11pt" style:font-weight-asian="bold" style:font-size-complex="11pt" style:font-weight-complex="bold"/>
    </style:style>
    <style:style style:name="P25" style:family="paragraph" style:parent-style-name="Text_20_body">
      <style:text-properties officeooo:paragraph-rsid="0017973a"/>
    </style:style>
    <style:style style:name="P26" style:family="paragraph" style:parent-style-name="Text_20_body">
      <style:text-properties officeooo:paragraph-rsid="00234412"/>
    </style:style>
    <style:style style:name="T1" style:family="text">
      <style:text-properties officeooo:rsid="0015c3f4"/>
    </style:style>
    <style:style style:name="T2" style:family="text">
      <style:text-properties style:font-name="Nimbus Roman" fo:font-size="11pt" officeooo:rsid="0015c3f4" style:font-size-asian="11pt" style:font-size-complex="11pt"/>
    </style:style>
    <style:style style:name="T3" style:family="text">
      <style:text-properties style:font-name="Nimbus Roman" fo:font-size="11pt" officeooo:rsid="00156877" style:font-size-asian="11pt" style:font-size-complex="11pt"/>
    </style:style>
    <style:style style:name="T4" style:family="text">
      <style:text-properties style:font-name="Nimbus Roman" fo:font-size="11pt" style:font-size-asian="11pt" style:font-size-complex="11pt"/>
    </style:style>
    <style:style style:name="T5" style:family="text">
      <style:text-properties officeooo:rsid="0017973a"/>
    </style:style>
    <style:style style:name="T6" style:family="text">
      <style:text-properties officeooo:rsid="001d03ef"/>
    </style:style>
    <style:style style:name="T7" style:family="text">
      <style:text-properties officeooo:rsid="001ac5d5"/>
    </style:style>
    <style:style style:name="T8" style:family="text">
      <style:text-properties officeooo:rsid="001e9dbe"/>
    </style:style>
    <style:style style:name="T9" style:family="text">
      <style:text-properties officeooo:rsid="001bfbb8"/>
    </style:style>
    <style:style style:name="T10" style:family="text">
      <style:text-properties officeooo:rsid="001fe8e8"/>
    </style:style>
    <style:style style:name="T11" style:family="text">
      <style:text-properties officeooo:rsid="00203b44"/>
    </style:style>
    <style:style style:name="T12" style:family="text">
      <style:text-properties fo:font-weight="normal" officeooo:rsid="001a265b" style:font-weight-asian="normal" style:font-weight-complex="normal"/>
    </style:style>
    <style:style style:name="T13" style:family="text">
      <style:text-properties officeooo:rsid="00220821"/>
    </style:style>
    <style:style style:name="T14" style:family="text">
      <style:text-properties fo:font-size="11pt" officeooo:rsid="00197692" style:font-size-asian="11pt" style:font-size-complex="11pt"/>
    </style:style>
    <style:style style:name="T15" style:family="text">
      <style:text-properties officeooo:rsid="0020c192"/>
    </style:style>
    <style:style style:name="T16" style:family="text">
      <style:text-properties officeooo:rsid="00234412"/>
    </style:style>
    <style:style style:name="fr1" style:family="graphic" style:parent-style-name="Graphics">
      <style:graphic-properties style:mirror="none" fo:clip="rect(0in, 0in, 0.2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SM <text:span text:style-name="T1">P</text:span>assive <text:span text:style-name="T1">I</text:span>nterception</text:p>
      <text:p text:style-name="P2">Bands:</text:p>
      <text:p text:style-name="P3"><text:span text:style-name="T2">Frequency bands usually found in the </text:span><text:span text:style-name="T3">900 M</text:span><text:span text:style-name="T2">H</text:span><text:span text:style-name="T3">z or 1800 M</text:span><text:span text:style-name="T2">H</text:span><text:span text:style-name="T3">z bands </text:span><text:span text:style-name="T2">(some countries use </text:span><text:span text:style-name="T4">850 MHz and 1900 MHz </text:span><text:span text:style-name="T2">or very rarely </text:span><text:span text:style-name="T4">400 </text:span><text:span text:style-name="T2">MHz </text:span><text:span text:style-name="T4">and 450</text:span><text:span text:style-name="T2"> </text:span><text:span text:style-name="T4">MHz </text:span><text:span text:style-name="T2">if these frequencies were already allotted).</text:span><text:bookmark text:name="__DdeLink__24_2846328301"/></text:p>
      <text:p text:style-name="P2">Recognition:</text:p>
      <text:p text:style-name="P4">Multiple distinct lines across waterfall at regular intervals (approximately 200Khz wide).</text:p>
      <text:p text:style-name="P5"><draw:frame draw:style-name="fr1" draw:name="Image1" text:anchor-type="char" svg:width="6.6929in" svg:height="3.6492in" draw:z-index="0"><draw:image xlink:href="Pictures/10000000000005B0000003338A4A18BA.png" xlink:type="simple" xlink:show="embed" xlink:actuate="onLoad" draw:mime-type="image/png"/></draw:frame>Individual waterfalls do not sound that different from dial-up.</text:p>
      <text:p text:style-name="P6"><text:span text:style-name="T5">Technical</text:span> breakdown:</text:p>
      <text:p text:style-name="P7">Each signal is divided into time-slots for each phone. This allows for eight full-rate or sixteen half rate speech channels per radio frequency. These burst periods (timeslots) are grouped into a TDMA frame while half-rate channels use alternate frames in the same timeslot. Channel data rate for all 8 channels is 270.833 kbit/s and the frame duration is 4.615 ms.</text:p>
      <text:p text:style-name="P8"><text:span text:style-name="T6">Reception and decryption</text:span>:</text:p>
      <text:p text:style-name="P9">The gr-gsm package provides <text:span text:style-name="T7">utilities. </text:span><text:span text:style-name="T8">Needed to retrieve signal.</text:span></text:p>
      <text:p text:style-name="P10">Scanning mode: grgsm_scanner</text:p>
      <text:p text:style-name="P10"><text:span text:style-name="T6">Use the </text:span>-<text:span text:style-name="T9">h </text:span><text:span text:style-name="T6">flag for </text:span><text:span text:style-name="T9">help. </text:span><text:span text:style-name="T6">This includes available frequency bands.</text:span><text:bookmark text:name="__DdeLink__236_2846328301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&gt; grgsm_scanner -b GSM900 -g 49</text:p>
          </table:table-cell>
        </table:table-row>
        <table:table-row>
          <table:table-cell table:style-name="Table1.A1" office:value-type="string">
            <text:p text:style-name="P12">Try scan CCCH on 975-1023 arfcn`s: Scanning: 0.00% done..</text:p>
            <text:p text:style-name="P13">Found CCCH arfcn: 977 </text:p>
            <text:p text:style-name="P13">ARFCN: <text:s/>977, Freq: <text:s/>925.6M, CID: 34694, LAC: <text:s/>1303, MCC: 206, MNC: <text:s/>20, Pwr: -43 </text:p>
            <text:p text:style-name="P13"><text:soft-page-break/>|---- Configuration: 1 CCCH, not combined </text:p>
            <text:p text:style-name="P13">|---- Cell ARFCNs: 978, 979, 980, 1018, 1019, 1020 </text:p>
            <text:p text:style-name="P13">|---- DCCHs: </text:p>
            <text:p text:style-name="P13">|-------- #1 SDCCH/8, Timeslot: 2, Training Sequence: 2, MAIO: 0, HSN: 0, A5/1 Version: ?, this CCCH is not present in hopping list | possible signal imposition </text:p>
            <text:p text:style-name="P13">|---- Neighbour Cells: 787, 788, 789, 883, 884, 885, 975, 976, 977, 1021, 1022, 1023</text:p>
          </table:table-cell>
        </table:table-row>
      </table:table>
      <text:p text:style-name="P14"/>
      <text:p text:style-name="P15"><text:span text:style-name="T10">Live r</text:span>eception mode: grgsm_livemon</text:p>
      <text:p text:style-name="P16">Live decoding of a GSM signal. <text:span text:style-name="T11">Help available via -h flag. </text:span>Graphical mode pictured below:</text:p>
      <text:p text:style-name="P17"><draw:frame draw:style-name="fr2" draw:name="Image2" text:anchor-type="char" svg:width="6.6929in" svg:height="3.6528in" draw:z-index="1"><draw:image xlink:href="Pictures/1000000000000780000004185A8D4AFF.png" xlink:type="simple" xlink:show="embed" xlink:actuate="onLoad" draw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8">&gt;<text:span text:style-name="T12">grgsm_livemon -f 934400000 -g 49</text:span></text:p>
          </table:table-cell>
        </table:table-row>
        <table:table-row>
          <table:table-cell table:style-name="Table2.A1" office:value-type="string">
            <text:p text:style-name="P19">00 00 00 00 00 00 00 00 <text:s/>00 00 00 00 08 00 45 00</text:p>
            <text:p text:style-name="P19">00 43 36 e3 40 00 40 11 <text:s/>05 c5 7f 00 00 01 7f 00</text:p>
            <text:p text:style-name="P19">00 01 92 4a 12 79 00 2f <text:s/>fe 42 02 04 01 00 03 fd</text:p>
            <text:p text:style-name="P19">d1 00 00 0c ec 54 02 be <text:s/>04 bb 15 06 21 00 01 f0</text:p>
            <text:p text:style-name="P19">2b 30 2b 2b 2b 2b 2b 2b <text:s/>2b 2b 2b 2b 2b 2b 2b 2b</text:p>
            <text:p text:style-name="P19">2b</text:p>
          </table:table-cell>
        </table:table-row>
      </table:table>
      <text:p text:style-name="P9"><text:soft-page-break/></text:p>
      <text:p text:style-name="P20">This can then be decoded by Wireshark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0">&gt;sudo wireshark -k -Y 'gsmtap' -i lo</text:p>
          </table:table-cell>
        </table:table-row>
      </table:table>
      <text:p text:style-name="P20"/>
      <text:p text:style-name="P20"><draw:frame draw:style-name="fr3" draw:name="Image3" text:anchor-type="char" svg:width="6.6929in" svg:height="3.6528in" draw:z-index="2"><draw:image xlink:href="Pictures/100000000000078000000418CDA65F61.jpg" xlink:type="simple" xlink:show="embed" xlink:actuate="onLoad" draw:mime-type="image/jpeg"/></draw:frame></text:p>
      <text:p text:style-name="P21">Values can be read from within wireshark itself.</text:p>
      <text:p text:style-name="P21">Saving to file: grgsm_capture</text:p>
      <text:p text:style-name="P21">Example: grgsm_capture -f 935.2M -o capture.cfile</text:p>
      <text:p text:style-name="P21">Use -h flag for options.</text:p>
      <text:p text:style-name="P21">Decoding from file<text:bookmark-start text:name="__DdeLink__316_2846328301"/>:<text:bookmark-end text:name="__DdeLink__316_2846328301"/> grgsm_decode</text:p>
      <text:p text:style-name="P21">grgsm_decode -c capture.cfile -f 935.2M -s 2e6 –cch</text:p>
      <text:p text:style-name="P21">Wireshark can then be used for analysis.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2">Flag</text:p>
          </table:table-cell>
          <table:table-cell table:style-name="Table4.A1" office:value-type="string">
            <text:p text:style-name="P22">Channel</text:p>
          </table:table-cell>
          <table:table-cell table:style-name="Table4.A1" office:value-type="string">
            <text:p text:style-name="P22">Decodes</text:p>
          </table:table-cell>
        </table:table-row>
        <table:table-row>
          <table:table-cell table:style-name="Table4.A2" office:value-type="string">
            <text:p text:style-name="P19">--<text:span text:style-name="T13">cch</text:span></text:p>
          </table:table-cell>
          <table:table-cell table:style-name="Table4.A2" office:value-type="string">
            <text:p text:style-name="P22">Control Channels</text:p>
          </table:table-cell>
          <table:table-cell table:style-name="Table4.A2" office:value-type="string">
            <text:p text:style-name="P22">BCCH, CCCH, SCH, FCCH (broadcasting and paging)</text:p>
          </table:table-cell>
        </table:table-row>
        <table:table-row>
          <table:table-cell table:style-name="Table4.A3" office:value-type="string">
            <text:p text:style-name="P19">--<text:span text:style-name="T13">sdcch</text:span></text:p>
          </table:table-cell>
          <table:table-cell table:style-name="Table4.B3" office:value-type="string">
            <text:p text:style-name="P22">Standalone Dedicated Control Channel</text:p>
          </table:table-cell>
          <table:table-cell table:style-name="Table4.C3" office:value-type="string">
            <text:p text:style-name="P22">Per-device signalling, SMS, call setup, authentication</text:p>
          </table:table-cell>
        </table:table-row>
        <table:table-row>
          <table:table-cell table:style-name="Table4.A4" office:value-type="string">
            <text:p text:style-name="P19">--<text:span text:style-name="T13">tch-f</text:span></text:p>
          </table:table-cell>
          <table:table-cell table:style-name="Table4.B4" office:value-type="string">
            <text:p text:style-name="P22">Traffic Channel Full-rate</text:p>
          </table:table-cell>
          <table:table-cell table:style-name="Table4.C4" office:value-type="string">
            <text:p text:style-name="P22">Full-rate voice (13kbps codec)</text:p>
          </table:table-cell>
        </table:table-row>
        <table:table-row>
          <table:table-cell table:style-name="Table4.A3" office:value-type="string">
            <text:p text:style-name="P19">--<text:span text:style-name="T13">tch-h</text:span></text:p>
          </table:table-cell>
          <table:table-cell table:style-name="Table4.B3" office:value-type="string">
            <text:p text:style-name="P22">Traffic Channel Half-rate</text:p>
          </table:table-cell>
          <table:table-cell table:style-name="Table4.C3" office:value-type="string">
            <text:p text:style-name="P22">Half-rate voice (6.5kbps codec)</text:p>
          </table:table-cell>
        </table:table-row>
        <table:table-row>
          <table:table-cell table:style-name="Table4.A4" office:value-type="string">
            <text:p text:style-name="P19">--<text:span text:style-name="T13">pacch</text:span></text:p>
          </table:table-cell>
          <table:table-cell table:style-name="Table4.B4" office:value-type="string">
            <text:p text:style-name="P22">Packet Associated Control Channel</text:p>
          </table:table-cell>
          <table:table-cell table:style-name="Table4.C4" office:value-type="string">
            <text:p text:style-name="P22">GPRS control</text:p>
          </table:table-cell>
        </table:table-row>
        <table:table-row>
          <table:table-cell table:style-name="Table4.A7" office:value-type="string">
            <text:p text:style-name="P19">--<text:span text:style-name="T13">pdtch</text:span></text:p>
          </table:table-cell>
          <table:table-cell table:style-name="Table4.B7" office:value-type="string">
            <text:p text:style-name="P22">Packet Data Traffic Channel</text:p>
          </table:table-cell>
          <table:table-cell table:style-name="Table4.C7" office:value-type="string">
            <text:p text:style-name="P22">GPRS data bursts</text:p>
          </table:table-cell>
        </table:table-row>
      </table:table>
      <text:p text:style-name="P23"/>
      <text:p text:style-name="P21"/>
      <text:p text:style-name="P21"/>
      <text:p text:style-name="P24"><text:soft-page-break/>Resources:</text:p>
      <text:p text:style-name="P25"><text:a xlink:type="simple" xlink:href="https://en.wikipedia.org/wiki/GSM" text:style-name="Internet_20_link" text:visited-style-name="Visited_20_Internet_20_Link"><text:span text:style-name="T14">Wikipedia: GSM</text:span></text:a></text:p>
      <text:p text:style-name="P25"><text:a xlink:type="simple" xlink:href="https://en.wikipedia.org/wiki/Time-division_multiple_access" text:style-name="Internet_20_link" text:visited-style-name="Visited_20_Internet_20_Link"><text:span text:style-name="T14">Wikipedia: TDMA</text:span></text:a></text:p>
      <text:p text:style-name="P25"><text:a xlink:type="simple" xlink:href="https://en.wikipedia.org/wiki/GSM_frequency_bands" text:style-name="Internet_20_link" text:visited-style-name="Visited_20_Internet_20_Link"><text:span text:style-name="T9">Wikipedia: GSM frequency bands</text:span></text:a></text:p>
      <text:p text:style-name="P25"><text:a xlink:type="simple" xlink:href="https://github.com/ptrkrysik/gr-gsm/wiki/Usage" text:style-name="Internet_20_link" text:visited-style-name="Visited_20_Internet_20_Link"><text:span text:style-name="T15">Github: gr-gsm</text:span></text:a></text:p>
      <text:p text:style-name="P26"><text:a xlink:type="simple" xlink:href="https://www.scribd.com/document/59428194/GPRS-and-GSM-System-Information-Detail" text:style-name="Internet_20_link" text:visited-style-name="Visited_20_Internet_20_Link"><text:span text:style-name="T16">Scribd: GSM System Information Details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2T23:45:03.648291655</meta:creation-date>
    <dc:date>2026-06-08T04:07:28.102480037</dc:date>
    <meta:editing-duration>PT2H8M27S</meta:editing-duration>
    <meta:editing-cycles>14</meta:editing-cycles>
    <meta:generator>LibreOffice/26.2.2.2$Linux_X86_64 LibreOffice_project/620$Build-2</meta:generator>
    <meta:document-statistic meta:table-count="4" meta:image-count="3" meta:object-count="0" meta:page-count="4" meta:paragraph-count="66" meta:word-count="477" meta:character-count="2765" meta:non-whitespace-character-count="2345"/>
  </office:meta>
</office:document-meta>
</file>